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BB8000007D0B49462FD.png" manifest:media-type="image/png"/>
  <manifest:file-entry manifest:full-path="Pictures/1000000000000A260000062131C76D92.jpg" manifest:media-type="image/jpeg"/>
  <manifest:file-entry manifest:full-path="Pictures/1000000100000C24000007D8D20AF0B2.png" manifest:media-type="image/png"/>
  <manifest:file-entry manifest:full-path="Pictures/1000000000000A26000005DFAE07C637.jpg" manifest:media-type="image/jpeg"/>
  <manifest:file-entry manifest:full-path="Pictures/1000000000000C660000077DA9F8685F.jpg" manifest:media-type="image/jpeg"/>
  <manifest:file-entry manifest:full-path="Pictures/1000000000000C660000077D3681E25E.jpg" manifest:media-type="image/jpeg"/>
  <manifest:file-entry manifest:full-path="Pictures/1000000000000C660000077D4F9D9FED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551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Master6-Layout7-blank-Пусто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6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Master9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9-Layout7-blank-Пустой-слайд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9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Master6-Layout7-blank-Пустой-слайд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5" style:family="paragraph">
      <loext:graphic-properties draw:fill="none"/>
      <style:paragraph-properties style:font-independent-line-spacing="false"/>
    </style:style>
    <style:style style:name="P6" style:family="paragraph">
      <loext:graphic-properties draw:fill="none" draw:fill-color="#ffffff"/>
      <style:paragraph-properties style:font-independent-line-spacing="true"/>
    </style:style>
    <style:style style:name="P7" style:family="paragraph">
      <style:paragraph-properties fo:margin-left="0cm" fo:margin-right="0cm" fo:margin-top="0cm" fo:margin-bottom="0cm" fo:line-height="105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3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36pt" style:font-style-asian="normal" style:font-weight-asian="bold" style:font-name-complex="Lucida Sans1" style:font-size-complex="36pt" style:font-style-complex="normal" style:font-weight-complex="bold"/>
    </style:style>
    <style:style style:name="T2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6pt" style:font-style-asian="normal" style:font-weight-asian="normal" style:font-name-complex="Lucida Sans1" style:font-size-complex="36pt" style:font-style-complex="normal" style:font-weight-complex="normal"/>
    </style:style>
    <style:style style:name="T3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36pt" style:font-style-asian="normal" style:font-weight-asian="bold" style:font-name-complex="Lucida Sans1" style:font-size-complex="36pt" style:font-style-complex="normal" style:font-weight-complex="bold"/>
    </style:style>
    <style:style style:name="T4" style:family="text">
      <style:text-properties fo:font-variant="normal" fo:text-transform="none" fo:color="#2657a0" loext:opacity="100%" style:text-line-through-style="none" style:text-line-through-type="none" style:text-position="0% 100%" style:font-name="Montserrat SemiBold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5" style:family="text">
      <style:text-properties fo:font-variant="normal" fo:text-transform="none" fo:color="#2657a0" loext:opacity="100%" style:text-line-through-style="none" style:text-line-through-type="none" style:text-position="0% 100%" style:font-name="Montserrat SemiBold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font-style-asian="normal" style:font-weight-asian="bold" style:font-name-complex="Lucida Sans1" style:font-size-complex="1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7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ffbfff" style:font-name-asian="Microsoft YaHei" style:font-size-asian="18pt" style:font-style-asian="normal" style:font-weight-asian="bold" style:font-name-complex="Lucida Sans1" style:font-size-complex="18pt" style:font-style-complex="normal" style:font-weight-complex="bold"/>
    </style:style>
    <style:style style:name="T8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bfbfff" style:font-name-asian="Microsoft YaHei" style:font-size-asian="18pt" style:font-style-asian="normal" style:font-weight-asian="bold" style:font-name-complex="Lucida Sans1" style:font-size-complex="18pt" style:font-style-complex="normal" style:font-weight-complex="bold"/>
    </style:style>
    <style:style style:name="T9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ffdfbf" style:font-name-asian="Microsoft YaHei" style:font-size-asian="18pt" style:font-style-asian="normal" style:font-weight-asian="bold" style:font-name-complex="Lucida Sans1" style:font-size-complex="18pt" style:font-style-complex="normal" style:font-weight-complex="bold"/>
    </style:style>
    <style:style style:name="T10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bfffbf" style:font-name-asian="Microsoft YaHei" style:font-size-asian="18pt" style:font-style-asian="normal" style:font-weight-asian="bold" style:font-name-complex="Lucida Sans1" style:font-size-complex="18pt" style:font-style-complex="normal" style:font-weight-complex="bold"/>
    </style:style>
    <style:style style:name="T11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ffcdda" style:font-name-asian="Microsoft YaHei" style:font-size-asian="18pt" style:font-style-asian="normal" style:font-weight-asian="bold" style:font-name-complex="Lucida Sans1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bold" style:font-name-complex="Lucida Sans1" style:font-size-complex="18pt" style:font-style-complex="normal" style:font-weight-complex="bold"/>
    </style:style>
    <style:style style:name="T13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bold" style:font-name-complex="Lucida Sans1" style:font-size-complex="44pt" style:font-style-complex="normal" style:font-weight-complex="bold"/>
    </style:style>
    <style:style style:name="T14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4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bold" style:font-name-complex="Lucida Sans1" style:font-size-complex="44pt" style:font-style-complex="normal" style:font-weight-complex="bold"/>
    </style:style>
    <style:style style:name="T15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2pt" style:font-style-asian="normal" style:font-weight-asian="normal" style:font-name-complex="Lucida Sans1" style:font-size-complex="22pt" style:font-style-complex="normal" style:font-weight-complex="normal"/>
    </style:style>
    <style:style style:name="T16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c6cdff" style:font-name-asian="Microsoft YaHei" style:font-size-asian="18pt" style:font-style-asian="normal" style:font-weight-asian="bold" style:font-name-complex="Lucida Sans1" style:font-size-complex="18pt" style:font-style-complex="normal" style:font-weight-complex="bold"/>
    </style:style>
    <style:style style:name="T17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c6cdff" style:font-name-asian="Microsoft YaHei" style:font-size-asian="18pt" style:font-style-asian="normal" style:font-weight-asian="bold" style:font-name-complex="Lucida Sans1" style:font-size-complex="18pt" style:font-style-complex="normal" style:font-weight-complex="bold"/>
    </style:style>
    <style:style style:name="T18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ffffbf" style:font-name-asian="Microsoft YaHei" style:font-size-asian="18pt" style:font-style-asian="normal" style:font-weight-asian="bold" style:font-name-complex="Lucida Sans1" style:font-size-complex="18pt" style:font-style-complex="normal" style:font-weight-complex="bold"/>
    </style:style>
    <style:style style:name="T19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c6ffff" style:font-name-asian="Microsoft YaHei" style:font-size-asian="18pt" style:font-style-asian="normal" style:font-weight-asian="bold" style:font-name-complex="Lucida Sans1" style:font-size-complex="18pt" style:font-style-complex="normal" style:font-weight-complex="bold"/>
    </style:style>
    <style:style style:name="T20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c6cdda" style:font-name-asian="Microsoft YaHei" style:font-size-asian="18pt" style:font-style-asian="normal" style:font-weight-asian="bold" style:font-name-complex="Lucida Sans1" style:font-size-complex="18pt" style:font-style-complex="normal" style:font-weight-complex="bold"/>
    </style:style>
    <style:style style:name="T21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2pt" style:font-style-asian="normal" style:font-weight-asian="normal" style:font-name-complex="Lucida Sans1" style:font-size-complex="22pt" style:font-style-complex="normal" style:font-weight-complex="normal"/>
    </style:style>
    <style:style style:name="T22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ffffbf" style:font-name-asian="Microsoft YaHei" style:font-size-asian="15pt" style:font-style-asian="normal" style:font-weight-asian="bold" style:font-name-complex="Lucida Sans1" style:font-size-complex="15pt" style:font-style-complex="normal" style:font-weight-complex="bold"/>
    </style:style>
    <style:style style:name="T23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5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ffffbf" style:font-name-asian="Microsoft YaHei" style:font-size-asian="15pt" style:font-style-asian="normal" style:font-weight-asian="bold" style:font-name-complex="Lucida Sans1" style:font-size-complex="15pt" style:font-style-complex="normal" style:font-weight-complex="bold"/>
    </style:style>
    <style:style style:name="T24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5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d9fed3" style:font-name-asian="Microsoft YaHei" style:font-size-asian="15pt" style:font-style-asian="normal" style:font-weight-asian="bold" style:font-name-complex="Lucida Sans1" style:font-size-complex="15pt" style:font-style-complex="normal" style:font-weight-complex="bold"/>
    </style:style>
    <style:style style:name="T25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5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cdd8ff" style:font-name-asian="Microsoft YaHei" style:font-size-asian="15pt" style:font-style-asian="normal" style:font-weight-asian="bold" style:font-name-complex="Lucida Sans1" style:font-size-complex="15pt" style:font-style-complex="normal" style:font-weight-complex="bold"/>
    </style:style>
    <style:style style:name="T26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5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ffd8ff" style:font-name-asian="Microsoft YaHei" style:font-size-asian="15pt" style:font-style-asian="normal" style:font-weight-asian="bold" style:font-name-complex="Lucida Sans1" style:font-size-complex="15pt" style:font-style-complex="normal" style:font-weight-complex="bold"/>
    </style:style>
    <style:style style:name="T27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5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ffbfbf" style:font-name-asian="Microsoft YaHei" style:font-size-asian="15pt" style:font-style-asian="normal" style:font-weight-asian="bold" style:font-name-complex="Lucida Sans1" style:font-size-complex="15pt" style:font-style-complex="normal" style:font-weight-complex="bold"/>
    </style:style>
    <style:style style:name="T28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5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c6cdda" style:font-name-asian="Microsoft YaHei" style:font-size-asian="15pt" style:font-style-asian="normal" style:font-weight-asian="bold" style:font-name-complex="Lucida Sans1" style:font-size-complex="15pt" style:font-style-complex="normal" style:font-weight-complex="bold"/>
    </style:style>
    <style:style style:name="T29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5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cbd3e7" style:font-name-asian="Microsoft YaHei" style:font-size-asian="15pt" style:font-style-asian="normal" style:font-weight-asian="bold" style:font-name-complex="Lucida Sans1" style:font-size-complex="15pt" style:font-style-complex="normal" style:font-weight-complex="bold"/>
    </style:style>
    <style:style style:name="T30" style:family="text">
      <style:text-properties fo:font-variant="normal" fo:text-transform="none" fo:color="#2657a0" loext:opacity="100%" style:text-line-through-style="none" style:text-line-through-type="none" style:text-position="0% 100%" style:font-name="Montserrat" fo:font-size="15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#bfbfff" style:font-name-asian="Microsoft YaHei" style:font-size-asian="15pt" style:font-style-asian="normal" style:font-weight-asian="bold" style:font-name-complex="Lucida Sans1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Модернизация ГКУ «Краснотурьинский ЦЗ»" draw:style-name="dp1" draw:master-page-name="Master6-Layout7-blank-Пустой-слайд" presentation:presentation-page-layout-name="AL1T33">
        <draw:frame draw:name="Рисунок 4" draw:style-name="gr1" draw:text-style-name="P1" draw:layer="layout" svg:width="33.864cm" svg:height="22.575cm" svg:x="0.003cm" svg:y="0cm">
          <draw:image xlink:href="Pictures/1000000100000BB8000007D0B49462FD.png" xlink:type="simple" xlink:show="embed" xlink:actuate="onLoad" draw:mime-type="image/png">
            <text:p/>
          </draw:image>
        </draw:frame>
        <draw:frame draw:name="PlaceHolder 1" presentation:style-name="pr1" draw:text-style-name="P3" draw:layer="layout" svg:width="32.276cm" svg:height="10.36cm" svg:x="0.724cm" svg:y="2.5cm" presentation:class="title">
          <draw:text-box>
            <text:p text:style-name="P2"><text:span text:style-name="T1">Предложения</text:span><text:span text:style-name="T2"><text:line-break/></text:span><text:span text:style-name="T1"> о приведении</text:span><text:span text:style-name="T3"> </text:span><text:span text:style-name="T1"><text:s/>Краснотурьинского ЦЗ</text:span><text:span text:style-name="T3"><text:line-break/></text:span><text:span text:style-name="T1"> в соответствие</text:span><text:span text:style-name="T3"> </text:span><text:span text:style-name="T1"><text:s/>с </text:span><text:span text:style-name="T3"><text:s/></text:span><text:span text:style-name="T1">Руководством</text:span><text:span text:style-name="T3"><text:line-break/></text:span><text:span text:style-name="T1"> по </text:span><text:span text:style-name="T3"><text:s/></text:span><text:span text:style-name="T1">фирменному </text:span><text:span text:style-name="T3"><text:s/></text:span><text:span text:style-name="T1">стилю </text:span><text:span text:style-name="T3"><text:s/></text:span><text:span text:style-name="T1">бренда</text:span><text:span text:style-name="T3"><text:line-break/></text:span><text:span text:style-name="T1"> «Работа России»</text:span></text:p>
          </draw:text-box>
        </draw:frame>
        <draw:frame draw:name="TextBox 3" draw:style-name="gr2" draw:text-style-name="P5" draw:layer="layout" svg:width="10.938cm" svg:height="1.801cm" svg:x="19.565cm" svg:y="14.547cm">
          <draw:text-box>
            <text:p text:style-name="P4"><text:span text:style-name="T4">Докладчик: <text:s/>О.Г. Иванова</text:span></text:p>
            <text:p text:style-name="P4"><text:span text:style-name="T5">18 ноября 2025 г.</text:span></text:p>
          </draw:text-box>
        </draw:frame>
        <presentation:notes draw:style-name="dp2">
          <draw:frame draw:name="Номер слайда 6" draw:style-name="gr3" draw:text-style-name="P3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page-thumbnail draw:name="Образ слайда 1" draw:style-name="gr4" draw:layer="layout" svg:width="19.791cm" svg:height="11.135cm" svg:x="0.604cm" svg:y="2.258cm" draw:page-number="1" presentation:class="page"/>
          <draw:frame draw:name="Заметки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 этаж" draw:style-name="dp1" draw:master-page-name="Master9-Layout7-blank-Пустой-слайд" presentation:presentation-page-layout-name="AL1T33">
        <draw:frame draw:name="Рисунок 12" draw:style-name="gr1" draw:text-style-name="P1" draw:layer="layout" svg:width="33.864cm" svg:height="22.575cm" svg:x="0.003cm" svg:y="0cm">
          <draw:image xlink:href="Pictures/1000000100000BB8000007D0B49462FD.png" xlink:type="simple" xlink:show="embed" xlink:actuate="onLoad" draw:mime-type="image/png">
            <text:p/>
          </draw:image>
        </draw:frame>
        <draw:frame draw:name="PlaceHolder 2" presentation:style-name="pr3" draw:text-style-name="P3" draw:layer="layout" svg:width="10.5cm" svg:height="9.349cm" svg:x="23cm" svg:y="4cm" presentation:class="outline">
          <draw:text-box>
            <text:list text:style-name="L3">
              <text:list-item>
                <text:p text:style-name="P7"><text:span text:style-name="T7">1. Входная зона</text:span></text:p>
              </text:list-item>
              <text:list-item>
                <text:p text:style-name="P7"><text:span text:style-name="T8">2. Ресепшн</text:span></text:p>
              </text:list-item>
              <text:list-item>
                <text:p text:style-name="P7"><text:span text:style-name="T9">2.1. Гардероб</text:span></text:p>
              </text:list-item>
              <text:list-item>
                <text:p text:style-name="P7"><text:span text:style-name="T8">3. Сектор ожидания для граждан. Сектор цифровых сервисов</text:span></text:p>
              </text:list-item>
              <text:list-item>
                <text:p text:style-name="P7"><text:span text:style-name="T8">3.1. Детская зона</text:span></text:p>
              </text:list-item>
              <text:list-item>
                <text:p text:style-name="P7"><text:span text:style-name="T10">4. Зона первичного приёма граждан. Зона индивидуальной работы с гражданами</text:span></text:p>
              </text:list-item>
              <text:list-item>
                <text:p text:style-name="P7"><text:span text:style-name="T10">5. Руководитель отдела</text:span></text:p>
              </text:list-item>
              <text:list-item>
                <text:p text:style-name="P7"><text:span text:style-name="T11">6. Кабинет психолога</text:span></text:p>
              </text:list-item>
              <text:list-item>
                <text:p text:style-name="P7"><text:span text:style-name="T12"/></text:p>
              </text:list-item>
            </text:list>
          </draw:text-box>
        </draw:frame>
        <draw:frame draw:style-name="gr1" draw:text-style-name="P1" draw:layer="layout" svg:width="22cm" svg:height="13.29cm" svg:x="1cm" svg:y="3.5cm">
          <draw:image xlink:href="Pictures/1000000000000A260000062131C76D92.jpg" xlink:type="simple" xlink:show="embed" xlink:actuate="onLoad" draw:mime-type="image/jpeg">
            <text:p/>
          </draw:image>
        </draw:frame>
        <draw:frame draw:name="PlaceHolder 1" presentation:style-name="pr4" draw:text-style-name="P3" draw:layer="layout" svg:width="29.207cm" svg:height="2.166cm" svg:x="2.328cm" svg:y="1.014cm" presentation:class="title">
          <draw:text-box>
            <text:p text:style-name="P8"><text:span text:style-name="T13">I </text:span><text:span text:style-name="T14">этаж</text:span><text:span text:style-name="T14"><text:line-break/></text:span><text:span text:style-name="T15">Зона быстрого обслуживания и первичного контакта</text:span></text:p>
          </draw:text-box>
        </draw:frame>
        <presentation:notes draw:style-name="dp2">
          <draw:frame draw:name="Номер слайда 6" draw:style-name="gr3" draw:text-style-name="P3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page-thumbnail draw:name="Образ слайда 1" draw:style-name="gr4" draw:layer="layout" svg:width="19.791cm" svg:height="11.135cm" svg:x="0.604cm" svg:y="2.258cm" draw:page-number="2" presentation:class="page"/>
          <draw:frame draw:name="Заметки 2"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 этаж" draw:style-name="dp1" draw:master-page-name="Master9-Layout7-blank-Пустой-слайд" presentation:presentation-page-layout-name="AL1T33">
        <draw:frame draw:name="Рисунок 11" draw:style-name="gr1" draw:text-style-name="P1" draw:layer="layout" svg:width="33.864cm" svg:height="22.575cm" svg:x="0.001cm" svg:y="0cm">
          <draw:image xlink:href="Pictures/1000000100000BB8000007D0B49462FD.png" xlink:type="simple" xlink:show="embed" xlink:actuate="onLoad" draw:mime-type="image/png">
            <text:p/>
          </draw:image>
        </draw:frame>
        <draw:frame draw:name="PlaceHolder 1" presentation:style-name="pr3" draw:text-style-name="P3" draw:layer="layout" svg:width="10.365cm" svg:height="11.589cm" svg:x="23.5cm" svg:y="3.911cm" presentation:class="outline">
          <draw:text-box>
            <text:list text:style-name="L3">
              <text:list-item>
                <text:p text:style-name="P9"><text:span text:style-name="T16">7. </text:span><text:span text:style-name="T17">Зал групповых занятий (конференц-зал)</text:span></text:p>
              </text:list-item>
              <text:list-item>
                <text:p text:style-name="P9"><text:span text:style-name="T18">8. Зона индивидуальной работы с работодателями</text:span></text:p>
              </text:list-item>
              <text:list-item>
                <text:p text:style-name="P9"><text:span text:style-name="T19">9. Переговорная</text:span></text:p>
              </text:list-item>
              <text:list-item>
                <text:p text:style-name="P9"><text:span text:style-name="T11">10. Руководитель отдела</text:span></text:p>
              </text:list-item>
              <text:list-item>
                <text:p text:style-name="P9"><text:span text:style-name="T11">11. Электронное тестирование</text:span></text:p>
              </text:list-item>
              <text:list-item>
                <text:p text:style-name="P9"><text:span text:style-name="T20">12. Архив</text:span></text:p>
              </text:list-item>
            </text:list>
          </draw:text-box>
        </draw:frame>
        <draw:frame draw:style-name="gr1" draw:text-style-name="P1" draw:layer="layout" svg:width="20.5cm" svg:height="13.25cm" svg:x="2cm" svg:y="3.47cm">
          <draw:image xlink:href="Pictures/1000000100000C24000007D8D20AF0B2.png" xlink:type="simple" xlink:show="embed" xlink:actuate="onLoad" draw:mime-type="image/png">
            <text:p/>
          </draw:image>
        </draw:frame>
        <draw:frame draw:name="PlaceHolder 3" presentation:style-name="pr4" draw:text-style-name="P3" draw:layer="layout" svg:width="29.207cm" svg:height="2.166cm" svg:x="2.329cm" svg:y="1.014cm" presentation:class="title">
          <draw:text-box>
            <text:p text:style-name="P8"><text:span text:style-name="T13">II </text:span><text:span text:style-name="T14">этаж</text:span><text:span text:style-name="T14"><text:line-break/></text:span><text:span text:style-name="T15">Зона углублённого консультирования и взаимодействия</text:span><text:span text:style-name="T21"> </text:span><text:span text:style-name="T15">с работодателями</text:span></text:p>
          </draw:text-box>
        </draw:frame>
        <presentation:notes draw:style-name="dp2">
          <draw:frame draw:name="Номер слайда 6" draw:style-name="gr3" draw:text-style-name="P3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page-thumbnail draw:name="Образ слайда 1" draw:style-name="gr4" draw:layer="layout" svg:width="19.791cm" svg:height="11.135cm" svg:x="0.604cm" svg:y="2.258cm" draw:page-number="3" presentation:class="page"/>
          <draw:frame draw:name="Заметки 2"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I этаж" draw:style-name="dp1" draw:master-page-name="Master9-Layout7-blank-Пустой-слайд" presentation:presentation-page-layout-name="AL1T33">
        <draw:frame draw:name="Рисунок 7" draw:style-name="gr1" draw:text-style-name="P1" draw:layer="layout" svg:width="33.864cm" svg:height="22.575cm" svg:x="0cm" svg:y="0cm">
          <draw:image xlink:href="Pictures/1000000100000BB8000007D0B49462FD.png" xlink:type="simple" xlink:show="embed" xlink:actuate="onLoad" draw:mime-type="image/png">
            <text:p/>
          </draw:image>
        </draw:frame>
        <draw:frame draw:name="PlaceHolder 2" presentation:style-name="pr3" draw:text-style-name="P3" draw:layer="layout" svg:width="10.414cm" svg:height="12.079cm" svg:x="23cm" svg:y="4cm" presentation:class="outline">
          <draw:text-box>
            <text:list text:style-name="L3">
              <text:list-item>
                <text:p text:style-name="P7"><text:span text:style-name="T22">13. </text:span><text:span text:style-name="T23">Кабинет руководителя территориального ЦЗН 2-го уровня</text:span></text:p>
              </text:list-item>
              <text:list-item>
                <text:p text:style-name="P7"><text:span text:style-name="T24">14. Кабинет специалиста</text:span></text:p>
              </text:list-item>
              <text:list-item>
                <text:p text:style-name="P7"><text:span text:style-name="T25">15. Сервер</text:span></text:p>
              </text:list-item>
              <text:list-item>
                <text:p text:style-name="P7"><text:span text:style-name="T26">16. Руководитель отдела</text:span></text:p>
              </text:list-item>
              <text:list-item>
                <text:p text:style-name="P7"><text:span text:style-name="T27">17. Зона индивидуальной работы с гражданами</text:span></text:p>
              </text:list-item>
              <text:list-item>
                <text:p text:style-name="P7"><text:span text:style-name="T27">17.1. Кабинет специалиста</text:span></text:p>
              </text:list-item>
              <text:list-item>
                <text:p text:style-name="P7"><text:span text:style-name="T27">17.2. Кабинет специалиста</text:span></text:p>
              </text:list-item>
              <text:list-item>
                <text:p text:style-name="P7"><text:span text:style-name="T27">17.3. Кабинет специалиста</text:span></text:p>
              </text:list-item>
              <text:list-item>
                <text:p text:style-name="P7"><text:span text:style-name="T28">18. Гардероб</text:span></text:p>
              </text:list-item>
              <text:list-item>
                <text:p text:style-name="P7"><text:span text:style-name="T29">19. Кухня и зона отдыха для сотрудников</text:span></text:p>
              </text:list-item>
              <text:list-item>
                <text:p text:style-name="P7"><text:span text:style-name="T30">20. Кабинет специалиста</text:span></text:p>
              </text:list-item>
            </text:list>
          </draw:text-box>
        </draw:frame>
        <draw:frame draw:name="PlaceHolder 4" presentation:style-name="pr4" draw:text-style-name="P3" draw:layer="layout" svg:width="29.207cm" svg:height="2.166cm" svg:x="2.33cm" svg:y="1.014cm" presentation:class="title">
          <draw:text-box>
            <text:p text:style-name="P8"><text:span text:style-name="T13">III </text:span><text:span text:style-name="T14">этаж</text:span><text:span text:style-name="T14"><text:line-break/></text:span><text:span text:style-name="T15">Административные и рабочие зоны для персонала</text:span></text:p>
          </draw:text-box>
        </draw:frame>
        <draw:frame draw:style-name="gr1" draw:text-style-name="P1" draw:layer="layout" svg:width="22cm" svg:height="12.74cm" svg:x="1cm" svg:y="4cm">
          <draw:image xlink:href="Pictures/1000000000000A26000005DFAE07C637.jpg" xlink:type="simple" xlink:show="embed" xlink:actuate="onLoad" draw:mime-type="image/jpeg">
            <text:p/>
          </draw:image>
        </draw:frame>
        <presentation:notes draw:style-name="dp2">
          <draw:frame draw:name="Номер слайда 6" draw:style-name="gr3" draw:text-style-name="P3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page-thumbnail draw:name="Образ слайда 1" draw:style-name="gr4" draw:layer="layout" svg:width="19.791cm" svg:height="11.135cm" svg:x="0.604cm" svg:y="2.258cm" draw:page-number="4" presentation:class="page"/>
          <draw:frame draw:name="Заметки 2"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6-Layout7-blank-Пустой-слайд" presentation:presentation-page-layout-name="AL1T33">
        <draw:frame draw:name="Рисунок 6" draw:style-name="gr1" draw:text-style-name="P1" draw:layer="layout" svg:width="33.864cm" svg:height="22.575cm" svg:x="0.003cm" svg:y="0cm">
          <draw:image xlink:href="Pictures/1000000100000BB8000007D0B49462FD.png" xlink:type="simple" xlink:show="embed" xlink:actuate="onLoad" draw:mime-type="image/png">
            <text:p/>
          </draw:image>
        </draw:frame>
        <draw:frame draw:style-name="gr1" draw:text-style-name="P1" draw:layer="layout" svg:width="26.881cm" svg:height="16.24cm" svg:x="3cm" svg:y="0.446cm">
          <draw:image xlink:href="Pictures/1000000000000C660000077D3681E25E.jpg" xlink:type="simple" xlink:show="embed" xlink:actuate="onLoad" draw:mime-type="image/jpeg">
            <text:p/>
          </draw:image>
        </draw:frame>
        <presentation:notes draw:style-name="dp2">
          <draw:frame draw:name="Номер слайда 6" draw:style-name="gr3" draw:text-style-name="P3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4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5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7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8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9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page-thumbnail draw:name="Образ слайда 4" draw:style-name="gr4" draw:layer="layout" svg:width="19.791cm" svg:height="11.135cm" svg:x="0.604cm" svg:y="2.258cm" draw:page-number="5" presentation:class="page"/>
          <draw:frame draw:name="Заметки 4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6-Layout7-blank-Пустой-слайд" presentation:presentation-page-layout-name="AL1T33">
        <draw:frame draw:name="Рисунок 8" draw:style-name="gr1" draw:text-style-name="P1" draw:layer="layout" svg:width="33.864cm" svg:height="22.575cm" svg:x="0.003cm" svg:y="0cm">
          <draw:image xlink:href="Pictures/1000000100000BB8000007D0B49462FD.png" xlink:type="simple" xlink:show="embed" xlink:actuate="onLoad" draw:mime-type="image/png">
            <text:p/>
          </draw:image>
        </draw:frame>
        <draw:frame draw:style-name="gr1" draw:text-style-name="P1" draw:layer="layout" svg:width="26.881cm" svg:height="16.24cm" svg:x="3cm" svg:y="0.446cm">
          <draw:image xlink:href="Pictures/1000000000000C660000077DA9F8685F.jpg" xlink:type="simple" xlink:show="embed" xlink:actuate="onLoad" draw:mime-type="image/jpeg">
            <text:p/>
          </draw:image>
        </draw:frame>
        <presentation:notes draw:style-name="dp2">
          <draw:frame draw:name="Номер слайда 6" draw:style-name="gr3" draw:text-style-name="P3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10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11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12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13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14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page-thumbnail draw:name="Образ слайда 5" draw:style-name="gr4" draw:layer="layout" svg:width="19.791cm" svg:height="11.135cm" svg:x="0.604cm" svg:y="2.258cm" draw:page-number="6" presentation:class="page"/>
          <draw:frame draw:name="Заметки 5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6-Layout7-blank-Пустой-слайд" presentation:presentation-page-layout-name="AL1T33">
        <draw:frame draw:name="Рисунок 10" draw:style-name="gr1" draw:text-style-name="P1" draw:layer="layout" svg:width="33.864cm" svg:height="22.575cm" svg:x="0.003cm" svg:y="0cm">
          <draw:image xlink:href="Pictures/1000000100000BB8000007D0B49462FD.png" xlink:type="simple" xlink:show="embed" xlink:actuate="onLoad" draw:mime-type="image/png">
            <text:p/>
          </draw:image>
        </draw:frame>
        <draw:frame draw:style-name="gr1" draw:text-style-name="P1" draw:layer="layout" svg:width="26.881cm" svg:height="16.24cm" svg:x="3cm" svg:y="0.446cm">
          <draw:image xlink:href="Pictures/1000000000000C660000077D4F9D9FED.jpg" xlink:type="simple" xlink:show="embed" xlink:actuate="onLoad" draw:mime-type="image/jpeg">
            <text:p/>
          </draw:image>
        </draw:frame>
        <presentation:notes draw:style-name="dp2">
          <draw:frame draw:name="Номер слайда 6" draw:style-name="gr3" draw:text-style-name="P3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15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1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17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18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19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page-thumbnail draw:name="Образ слайда 6" draw:style-name="gr4" draw:layer="layout" svg:width="19.791cm" svg:height="11.135cm" svg:x="0.604cm" svg:y="2.258cm" draw:page-number="7" presentation:class="page"/>
          <draw:frame draw:name="Заметки 6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6-Layout7-blank-Пустой-слайд" presentation:presentation-page-layout-name="AL1T33">
        <draw:frame draw:name="Рисунок 3" draw:style-name="gr1" draw:text-style-name="P1" draw:layer="layout" svg:width="33.864cm" svg:height="22.575cm" svg:x="0.003cm" svg:y="0cm">
          <draw:image xlink:href="Pictures/1000000100000BB8000007D0B49462FD.png" xlink:type="simple" xlink:show="embed" xlink:actuate="onLoad" draw:mime-type="image/png">
            <text:p/>
          </draw:image>
        </draw:frame>
        <draw:frame draw:name="PlaceHolder 5" presentation:style-name="pr6" draw:text-style-name="P3" draw:layer="layout" svg:width="32.276cm" svg:height="10.36cm" svg:x="0.724cm" svg:y="2.5cm" presentation:class="title">
          <draw:text-box>
            <text:p text:style-name="P2"><text:span text:style-name="T1">Спасибо за внимание!</text:span></text:p>
          </draw:text-box>
        </draw:frame>
        <presentation:notes draw:style-name="dp2">
          <draw:frame draw:name="Номер слайда 6" draw:style-name="gr3" draw:text-style-name="P3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2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frame draw:name="Номер слайда 3" draw:style-name="gr3" draw:text-style-name="P5" draw:layer="layout" svg:width="9.113cm" svg:height="1.484cm" svg:x="11.886cm" svg:y="28.215cm">
            <draw:text-box>
              <text:p text:style-name="P4"><text:span text:style-name="T6"><text:page-number>&lt;номер&gt;</text:page-number></text:span></text:p>
            </draw:text-box>
          </draw:frame>
          <draw:page-thumbnail draw:name="Образ слайда 3" draw:style-name="gr4" draw:layer="layout" svg:width="19.791cm" svg:height="11.135cm" svg:x="0.604cm" svg:y="2.258cm" draw:page-number="8" presentation:class="page"/>
          <draw:frame draw:name="Заметки 3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6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7-blank-Пусто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7-blank-Пустой-слайд-outline1" style:family="presentation">
      <style:graphic-properties draw:stroke="none" draw:fill="none" draw:auto-grow-height="false" draw:fit-to-size="false" style:shrink-to-fit="true">
        <text:list-style style:name="Master6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7-blank-Пустой-слайд-outline2" style:family="presentation" style:parent-style-name="Master6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6-Layout7-blank-Пустой-слайд-outline3" style:family="presentation" style:parent-style-name="Master6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6-Layout7-blank-Пустой-слайд-outline4" style:family="presentation" style:parent-style-name="Master6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6-Layout7-blank-Пустой-слайд-outline5" style:family="presentation" style:parent-style-name="Master6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6-Layout7-blank-Пустой-слайд-outline6" style:family="presentation" style:parent-style-name="Master6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6-Layout7-blank-Пустой-слайд-outline7" style:family="presentation" style:parent-style-name="Master6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6-Layout7-blank-Пустой-слайд-outline8" style:family="presentation" style:parent-style-name="Master6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6-Layout7-blank-Пустой-слайд-outline9" style:family="presentation" style:parent-style-name="Master6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6-Layout7-blank-Пустой-слайд-subtitle" style:family="presentation">
      <style:graphic-properties draw:stroke="none" draw:fill="none" draw:textarea-vertical-align="middle">
        <text:list-style style:name="Master6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7-blank-Пустой-слайд-title" style:family="presentation">
      <style:graphic-properties draw:stroke="none" draw:fill="none" draw:textarea-vertical-align="middle">
        <text:list-style style:name="Master6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9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9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9-Layout7-blank-Пусто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9-Layout7-blank-Пустой-слайд-outline1" style:family="presentation">
      <style:graphic-properties draw:stroke="none" draw:fill="none" draw:auto-grow-height="false" draw:fit-to-size="false" style:shrink-to-fit="true">
        <text:list-style style:name="Master9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9-Layout7-blank-Пустой-слайд-outline2" style:family="presentation" style:parent-style-name="Master9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9-Layout7-blank-Пустой-слайд-outline3" style:family="presentation" style:parent-style-name="Master9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9-Layout7-blank-Пустой-слайд-outline4" style:family="presentation" style:parent-style-name="Master9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9-Layout7-blank-Пустой-слайд-outline5" style:family="presentation" style:parent-style-name="Master9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9-Layout7-blank-Пустой-слайд-outline6" style:family="presentation" style:parent-style-name="Master9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9-Layout7-blank-Пустой-слайд-outline7" style:family="presentation" style:parent-style-name="Master9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9-Layout7-blank-Пустой-слайд-outline8" style:family="presentation" style:parent-style-name="Master9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9-Layout7-blank-Пустой-слайд-outline9" style:family="presentation" style:parent-style-name="Master9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9-Layout7-blank-Пустой-слайд-subtitle" style:family="presentation">
      <style:graphic-properties draw:stroke="none" draw:fill="none" draw:textarea-vertical-align="middle">
        <text:list-style style:name="Master9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9-Layout7-blank-Пустой-слайд-title" style:family="presentation">
      <style:graphic-properties draw:stroke="none" draw:fill="none" draw:textarea-vertical-align="middle">
        <text:list-style style:name="Master9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6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6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6-Layout7-blank-Пустой-слай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6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6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6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6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9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9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9-Layout7-blank-Пустой-слай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9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9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9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9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  <draw:layer draw:name="Master6-bg" draw:protected="true"/>
      <draw:layer draw:name="Master7-bg" draw:protected="true"/>
      <draw:layer draw:name="Master8-bg" draw:protected="true"/>
      <draw:layer draw:name="Master9-bg" draw:protected="true"/>
      <draw:layer draw:name="Master10-bg" draw:protected="true"/>
      <draw:layer draw:name="Master11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6-Layout7-blank-Пусто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Дата 1" presentation:style-name="Mpr1" draw:text-style-name="MP3" draw:layer="backgroundobjects" svg:width="7.617cm" svg:height="1.011cm" svg:x="2.328cm" svg:y="17.657cm" presentation:class="date-time">
        <draw:text-box>
          <text:p/>
        </draw:text-box>
      </draw:frame>
      <draw:frame draw:name="Нижний колонтитул 2" presentation:style-name="Mpr2" draw:text-style-name="MP3" draw:layer="backgroundobjects" svg:width="11.427cm" svg:height="1.011cm" svg:x="11.218cm" svg:y="17.657cm" presentation:class="footer">
        <draw:text-box>
          <text:p/>
        </draw:text-box>
      </draw:frame>
      <draw:frame draw:name="Номер слайда 3" presentation:style-name="Mpr1" draw:text-style-name="MP3" draw:layer="backgroundobjects" svg:width="7.617cm" svg:height="1.011cm" svg:x="23.918cm" svg:y="17.657cm" presentation:class="page-number">
        <draw:text-box>
          <text:p text:style-name="MP4"><text:span text:style-name="MT2"><text:page-number>&lt;номер&gt;</text:page-number></text:span></text:p>
        </draw:text-box>
      </draw:frame>
      <draw:frame draw:name="Заголовок 4" presentation:style-name="Mpr3" draw:text-style-name="MP3" draw:layer="backgroundobjects" svg:width="30.479cm" svg:height="3.18cm" svg:x="1.693cm" svg:y="0.76cm" presentation:class="title">
        <draw:text-box>
          <text:p/>
        </draw:text-box>
      </draw:frame>
      <draw:frame draw:name="Текст 5" presentation:style-name="Mpr4" draw:text-style-name="MP3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page-thumbnail draw:name="Образ слайда 1" presentation:style-name="Master6-Layout7-blank-Пустой-слайд-title" draw:layer="backgroundobjects" svg:width="19.798cm" svg:height="11.136cm" svg:x="0.6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номер&gt;</text:page-number></text:span></text:p>
          </draw:text-box>
        </draw:frame>
      </presentation:notes>
    </style:master-page>
    <style:master-page style:name="Master9-Layout7-blank-Пусто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Дата 1" presentation:style-name="Mpr8" draw:text-style-name="MP3" draw:layer="backgroundobjects" svg:width="7.617cm" svg:height="1.011cm" svg:x="2.328cm" svg:y="17.657cm" presentation:class="date-time">
        <draw:text-box>
          <text:p/>
        </draw:text-box>
      </draw:frame>
      <draw:frame draw:name="Нижний колонтитул 2" presentation:style-name="Mpr9" draw:text-style-name="MP3" draw:layer="backgroundobjects" svg:width="11.427cm" svg:height="1.011cm" svg:x="11.218cm" svg:y="17.657cm" presentation:class="footer">
        <draw:text-box>
          <text:p/>
        </draw:text-box>
      </draw:frame>
      <draw:frame draw:name="Номер слайда 3" presentation:style-name="Mpr8" draw:text-style-name="MP3" draw:layer="backgroundobjects" svg:width="7.617cm" svg:height="1.011cm" svg:x="23.918cm" svg:y="17.657cm" presentation:class="page-number">
        <draw:text-box>
          <text:p text:style-name="MP4"><text:span text:style-name="MT2"><text:page-number>&lt;номер&gt;</text:page-number></text:span></text:p>
        </draw:text-box>
      </draw:frame>
      <draw:frame draw:name="Заголовок 4" presentation:style-name="Mpr10" draw:text-style-name="MP3" draw:layer="backgroundobjects" svg:width="30.479cm" svg:height="3.18cm" svg:x="1.693cm" svg:y="0.76cm" presentation:class="title">
        <draw:text-box>
          <text:p/>
        </draw:text-box>
      </draw:frame>
      <draw:frame draw:name="Текст 5" presentation:style-name="Mpr11" draw:text-style-name="MP3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page-thumbnail draw:name="Образ слайда 1" presentation:style-name="Master9-Layout7-blank-Пустой-слайд-title" draw:layer="backgroundobjects" svg:width="19.798cm" svg:height="11.136cm" svg:x="0.6cm" svg:y="2.257cm" presentation:class="page"/>
        <draw:frame draw:name="Заметки 2" presentation:style-name="Mpr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3.2$Windows_X86_64 LibreOffice_project/8ca8d55c161d602844f5428fa4b58097424e324e</meta:generator>
    <dc:title>Презентация PowerPoint</dc:title>
    <meta:creation-date>2025-11-13T17:54:24Z</meta:creation-date>
    <dc:date>2025-12-03T14:14:22.619726900</dc:date>
    <meta:editing-cycles>7</meta:editing-cycles>
    <meta:editing-duration>PT39M57S</meta:editing-duration>
    <meta:document-statistic meta:object-count="119"/>
    <meta:user-defined meta:name="AppVersion">16.0000</meta:user-defined>
    <meta:user-defined meta:name="Company">SPecialiST RePack</meta:user-defined>
    <meta:user-defined meta:name="PresentationFormat">Широкоэкранный</meta:user-defined>
    <meta:user-defined meta:name="Slides" meta:value-type="float">4</meta:user-defined>
  </office:meta>
</office:document-meta>
</file>